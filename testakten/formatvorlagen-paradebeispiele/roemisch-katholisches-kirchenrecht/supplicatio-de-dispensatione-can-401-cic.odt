
<file path=META-INF/manifest.xml><?xml version="1.0" encoding="utf-8"?>
<manifest:manifest xmlns:office="urn:oasis:names:tc:opendocument:xmlns:office:1.0" xmlns:text="urn:oasis:names:tc:opendocument:xmlns:text:1.0" xmlns:meta="urn:oasis:names:tc:opendocument:xmlns:meta:1.0" xmlns:style="urn:oasis:names:tc:opendocument:xmlns:style:1.0" xmlns:svg="urn:oasis:names:tc:opendocument:xmlns:svg-compatib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svg="urn:oasis:names:tc:opendocument:xmlns:svg-compatib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font-face-decls>
    <style:font-face style:name="Times New Roman" svg:font-family="Times New Roman" style:font-family-generic="roman" style:font-pitch="variable"/>
  </office:font-face-decls>
  <office:automatic-styles>
    <style:style style:name="Disclaimer" style:family="paragraph" style:parent-style-name="Default" style:display-name="Disclaimer">
      <style:text-properties style:font-name="Times New Roman" fo:font-size="10pt" fo:font-style="italic" fo:color="#444444"/>
      <style:paragraph-properties fo:text-align="justify" fo:margin-bottom="0.4cm"/>
    </style:style>
    <style:style style:name="H1" style:family="paragraph" style:parent-style-name="Default" style:display-name="H1">
      <style:text-properties style:font-name="Times New Roman" fo:font-size="16pt" fo:font-weight="bold"/>
      <style:paragraph-properties fo:text-align="left" fo:margin-top="0.4cm" fo:margin-bottom="0.2cm"/>
    </style:style>
    <style:style style:name="H2" style:family="paragraph" style:parent-style-name="Default" style:display-name="H2">
      <style:text-properties style:font-name="Times New Roman" fo:font-size="13pt" fo:font-weight="bold"/>
      <style:paragraph-properties fo:text-align="left" fo:margin-top="0.4cm" fo:margin-bottom="0.2cm"/>
    </style:style>
    <style:style style:name="H3" style:family="paragraph" style:parent-style-name="Default" style:display-name="H3">
      <style:text-properties style:font-name="Times New Roman" fo:font-size="11.5pt" fo:font-weight="bold"/>
      <style:paragraph-properties fo:text-align="left" fo:margin-top="0.4cm" fo:margin-bottom="0.2cm"/>
    </style:style>
    <style:style style:name="CenterBold" style:family="paragraph" style:parent-style-name="Default" style:display-name="CenterBold">
      <style:text-properties style:font-name="Times New Roman" fo:font-size="12pt" fo:font-weight="bold"/>
      <style:paragraph-properties fo:text-align="center" fo:margin-bottom="0.2cm"/>
    </style:style>
    <style:style style:name="Center" style:family="paragraph" style:parent-style-name="Default" style:display-name="Center">
      <style:text-properties style:font-name="Times New Roman" fo:font-size="11pt"/>
      <style:paragraph-properties fo:text-align="center" fo:margin-bottom="0.2cm"/>
    </style:style>
  </office:automatic-styles>
  <office:body>
    <office:text>
      <text:p text:style-name="Disclaimer">Achtung: Dies ist eine experimentelle KI-Vorlage. Keine Haftung, keine Gewaehr. Nur zum Ausprobieren der Skills und einer KI; keine Rechtsberatung. Vor jeder Verwendung im Mandat anwaltlich pruefen.</text:p>
      <text:p text:style-name="Disclaimer">Caution: This is an experimental AI-generated template. No liability, no warranty. For exploration of the skills and an AI only; not legal advice. Must be reviewed by a lawyer before any use in a mandate.</text:p>
      <text:p text:style-name="Default"/>
      <text:h text:style-name="H1" text:outline-level="1">Supplicatio de dispensatione (c. 401 § 1 CIC) — Bittschreiben auf Verlaengerung der bischoeflichen Amtszeit ueber das 75. Lebensjahr hinaus</text:h>
      <text:p text:style-name="Default">*Anmerkung: Dies ist eine experimentelle, anachronistisch-spielerische KI-Vorlage in modernem Kirchenlatein. Sie bildet einen realen Mechanismus (c. 401 § 1 CIC: Pflicht zur Amtsniederlegung mit Vollendung des 75. Lebensjahres; Dispens-Praxis des Roemischen Stuhls) typografisch nach. Keine kirchenrechtliche Beratung, keine Haftung, keine Gewaehr.*</text:p>
      <text:p text:style-name="Default">*Note: This is an experimental, intentionally archaic AI template in modern Church Latin. It mimics a real mechanism (c. 401 § 1 CIC: bishops must offer resignation upon completion of age 75; Holy See dispensation practice) typographically. Not canonical advice; no liability.*</text:p>
      <text:p text:style-name="Default"/>
      <text:p text:style-name="CenterBold">AD SACRUM CONSILIUM PRO EPISCOPIS</text:p>
      <text:p text:style-name="Center">Palatium Apostolicum, Vaticano</text:p>
      <text:p text:style-name="Center">Die [__] mensis [__] anno Domini MMXX[__]</text:p>
      <text:p text:style-name="Default"/>
      <text:h text:style-name="H2" text:outline-level="2">Beatissime Pater,</text:h>
      <text:p text:style-name="Default">ego, [Nomen episcopi], episcopus dioecesis [Nomen dioecesis], die [Geburtsdatum] anno Domini [Jahr] natus, qui die [Datum 75. Geburtstag] anno Domini MMXX[__] septuagesimum quintum aetatis annum complevero, vi can. 401 § 1 CIC paratus sum officium pastorale ex toto resignare et renuntiationem meam in manus Sanctitatis Vestrae humilissime offerre.</text:p>
      <text:p text:style-name="Default">*[Wenn der Bittsteller die Verlaengerung erbittet, hier ergaenzen:]* Cum tamen [konkreter Grund, z. B. „in dioecesi mea schisma minatur", „nullus successor adhuc designatus est", „provincialia visitatio canonica nondum perfecta est"], suppliciter peto, ut Sanctitas Vestra de plenitudine potestatis renuntiationem in spatio [Zahl] mensium *non acceptet* et me ad pastoralem servitium in officio pro tempore prolongato benigne dispenset.</text:p>
      <text:h text:style-name="H2" text:outline-level="2">Argumenta supplicationis</text:h>
      <text:p text:style-name="Default">1. **De salute animarum (suprema lex, can. 1752 CIC)**: [konkrete Begruendung]</text:p>
      <text:p text:style-name="Default">2. **De prudentia pastorali**: [Lage in der Dioezese]</text:p>
      <text:p text:style-name="Default">3. **De obstaculo successionis**: [warum derzeit kein Nachfolger]</text:p>
      <text:p text:style-name="Default">4. **De salubritate mea**: [Gesundheitsstand; nach c. 401 § 2 CIC ist Gesundheit ein Pflichtkriterium]</text:p>
      <text:h text:style-name="H2" text:outline-level="2">Beilagen (allegata)</text:h>
      <text:p text:style-name="Default">- A. *Schedula vitae nostrae* (curriculum)</text:p>
      <text:p text:style-name="Default">- B. *Indicia salubritatis* (aerztliches Attest)</text:p>
      <text:p text:style-name="Default">- C. *Relatio super statu dioecesis* (Lagebericht)</text:p>
      <text:p text:style-name="Default">- D. *Sententia Capituli cathedralis* (Stellungnahme Domkapitel)</text:p>
      <text:h text:style-name="H2" text:outline-level="2">Conclusio</text:h>
      <text:p text:style-name="Default">Quaestiones et determinationes Sanctitatis Vestrae reverenter expectans, et benedictionem apostolicam et pro me et pro grege mihi commisso humillime imploro.</text:p>
      <text:p text:style-name="Default"/>
      <text:p text:style-name="Default">Filius oboediens et minimus servus,</text:p>
      <text:p text:style-name="Default"/>
      <text:p text:style-name="Default">+ [Nomen et signum], Episcopus [Loci]</text:p>
      <text:p text:style-name="Default"/>
      <text:h text:style-name="H2" text:outline-level="2">Hinweis fuer das Mandat (auf Deutsch)</text:h>
      <text:p text:style-name="Default">**Reale Norm**: c. 401 § 1 CIC verpflichtet jeden Dioezesanbischof, mit Vollendung des 75. Lebensjahres dem Roemischen Pontifex die Resignation vom Amt anzubieten ("rogatur ut renuntiationem ab officio exhibeat"). Die Annahme oder das Hinausschieben liegt im freien Ermessen des Papstes.</text:p>
      <text:p text:style-name="Default">**Vergleichbar bei Kardinaelen**: Mit Vollendung des 80. Lebensjahres verlieren Kardinaele nach Motu proprio Pauls VI. "Ingravescentem aetatem" (21.11.1970) das aktive Wahlrecht im Konklave; mit 75 endet die Mitgliedschaft in Dikasterien-Aemtern als Standardregel der Reformkurie (vgl. Praedicate Evangelium 2022, Art. 17). Funktionsverlaengerungen sind moeglich.</text:p>
      <text:p text:style-name="Default">**Vor Verwendung**: Aktuellen CIC-Stand und kirchliche Gesetzgebung des Apostolischen Stuhls (Acta Apostolicae Sedis) live verifizieren. Diese Vorlage ist eine spielerische Hommage an den Kanzleistil der Roemischen Kurie und kein verbindliches Dokument.</text:p>
      <text:p text:style-name="Default"/>
      <text:h text:style-name="H3" text:outline-level="3">Felder im Template</text:h>
      <text:p text:style-name="Default">• [Nomen episcopi]</text:p>
      <text:p text:style-name="Default">• [Nomen dioecesis]</text:p>
      <text:p text:style-name="Default">• [Geburtsdatum + Jahr]</text:p>
      <text:p text:style-name="Default">• [Datum 75. Geburtstag]</text:p>
      <text:p text:style-name="Default">• [Zahl der erbetenen Verlaengerungsmonate]</text:p>
      <text:p text:style-name="Default">• [Konkreter Grund / pastorale Lage]</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svg="urn:oasis:names:tc:opendocument:xmlns:svg-compatible:1.0" xmlns:fo="urn:oasis:names:tc:opendocument:xmlns:xsl-fo-compatible:1.0" xmlns:manifest="urn:oasis:names:tc:opendocument:xmlns:manifest:1.0" office:version="1.2">
  <office:font-face-decls>
    <style:font-face style:name="Times New Roman" svg:font-family="Times New Roman" style:font-family-generic="roman" style:font-pitch="variable"/>
  </office:font-face-decls>
  <office:styles>
    <style:style style:name="Default" style:family="paragraph" style:display-name="Default">
      <style:text-properties style:font-name="Times New Roman" fo:font-size="11pt"/>
      <style:paragraph-properties fo:text-align="justify" fo:margin-bottom="0.2cm"/>
    </style:style>
  </office:styles>
  <office:automatic-styles>
    <style:page-layout style:name="Standard">
      <style:page-layout-properties fo:page-width="21cm" fo:page-height="29.7cm" fo:margin-top="2.5cm" fo:margin-bottom="2.5cm" fo:margin-left="2.5cm" fo:margin-right="2.5cm" style:writing-mode="lr-tb"/>
    </style:page-layout>
  </office:automatic-styles>
  <office:master-styles>
    <style:master-page style:name="Standard" style:page-layout-name="Standard" style:display-name="Standard"/>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svg="urn:oasis:names:tc:opendocument:xmlns:svg-compatib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2</meta:generator>
  </office:meta>
</office:document-meta>
</file>