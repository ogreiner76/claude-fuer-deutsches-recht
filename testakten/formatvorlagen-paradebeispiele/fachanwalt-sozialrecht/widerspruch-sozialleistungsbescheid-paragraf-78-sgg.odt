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Widerspruch gegen Sozialleistungsbescheid ($ 84 SGG / $ 36 VwVfG)</text:h>
      <text:p text:style-name="Center">An [Sozialleistungstraeger]</text:p>
      <text:p text:style-name="Center">[Anschrift]</text:p>
      <text:p text:style-name="Default"/>
      <text:p text:style-name="Default">Aktenzeichen: [Az.]</text:p>
      <text:p text:style-name="Default">Bescheid vom [Datum], zugegangen am [Zugangsdatum]</text:p>
      <text:p text:style-name="CenterBold">Widerspruch</text:p>
      <text:p text:style-name="Default">Namens und in Vollmacht von [Mandant Name, geb. (Datum), Adresse] (Anlage V1) lege ich gegen den oben genannten Bescheid hiermit</text:p>
      <text:p text:style-name="CenterBold">WIDERSPRUCH</text:p>
      <text:p text:style-name="Default">ein ($ 84 SGG, einmonatige Widerspruchsfrist ab Zugang).</text:p>
      <text:h text:style-name="H2" text:outline-level="2">1. Antraege</text:h>
      <text:p text:style-name="Default">1. Den angefochtenen Bescheid aufzuheben.</text:p>
      <text:p text:style-name="Default">2. Hilfsweise: Den Bescheid zugunsten der Mandantschaft so abzuaendern, dass [Konkrete Aenderung; z. B. Leistung in Hoehe von (Betrag) gewaehrt wird].</text:p>
      <text:p text:style-name="Default">3. Hinsichtlich der Aussetzung der Vollziehung von Nachforderungen wird ggf. parallel beantragt; [siehe Eilantrag $ 86b SGG].</text:p>
      <text:h text:style-name="H2" text:outline-level="2">2. Sachverhalt</text:h>
      <text:p text:style-name="Default">[Lebenssituation Mandant; Antragsverlauf; tatsaechliche und rechtliche Streitpunkte.]</text:p>
      <text:h text:style-name="H2" text:outline-level="2">3. Rechtliche Begruendung</text:h>
      <text:p text:style-name="Default">Der Bescheid ist rechtswidrig, weil [konkrete Begruendung]:</text:p>
      <text:p text:style-name="Default">- [SGB II / SGB III / SGB V / SGB VI / SGB XII Norm-Verstoss]</text:p>
      <text:p text:style-name="Default">- [Verfahrensfehler $$ 24, 33 SGB X (Anhoerung, Sachverhaltsaufklaerung)]</text:p>
      <text:p text:style-name="Default">- [Beweismaessige Fehler — Ueberforderung der Mandantschaft, fehlende Antragspruefung]</text:p>
      <text:h text:style-name="H2" text:outline-level="2">4. Beweismittel und Anlagen</text:h>
      <text:p text:style-name="Default">Anlage W1: Bescheid</text:p>
      <text:p text:style-name="Default">Anlage W2: Vollmacht</text:p>
      <text:p text:style-name="Default">Anlage W3: [Ärztliche Atteste / Lohnabrechnungen / Mietvertrag / Belege Krankenversicherung]</text:p>
      <text:p text:style-name="Default"/>
      <text:p text:style-name="Default">[Ort], [Datum]</text:p>
      <text:p text:style-name="Default">_______________________________</text:p>
      <text:p text:style-name="Default">[Rechtsanwalt / Sozialberatungsstelle]</text:p>
      <text:p text:style-name="Default"/>
      <text:h text:style-name="H3" text:outline-level="3">Felder im Template</text:h>
      <text:p text:style-name="Default">• [Sozialleistungstraeger]</text:p>
      <text:p text:style-name="Default">• [Mandant Daten]</text:p>
      <text:p text:style-name="Default">• [Az.]</text:p>
      <text:p text:style-name="Default">• [Bescheid-Datum + Zugang]</text:p>
      <text:p text:style-name="Default">• [Konkrete Streitpunkte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