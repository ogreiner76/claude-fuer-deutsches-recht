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Datenschutz-Folgenabschaetzung (Art. 35 DSGVO)</text:h>
      <text:p text:style-name="Default">*Diese Vorlage strukturiert eine DSFA nach Art. 35 DSGVO. Pflicht bei wahrscheinlich hohem Risiko fuer Rechte und Freiheiten betroffener Personen (siehe Aufsichtsbehoerden-Liste).*</text:p>
      <text:h text:style-name="H2" text:outline-level="2">1. Beschreibung der Verarbeitung</text:h>
      <text:p text:style-name="Default">Verantwortlicher: [Name + Anschrift + DSB]</text:p>
      <text:p text:style-name="Default">Verarbeitungstaetigkeit: [Name]</text:p>
      <text:p text:style-name="Default">Zweck: [konkret]</text:p>
      <text:p text:style-name="Default">Rechtsgrundlage: [Art. 6 I lit. a / b / c / e / f DSGVO; Art. 9 II lit. ? bei besonderen Kategorien]</text:p>
      <text:p text:style-name="Default">Datenkategorien: [Bestand, Nutzungsdaten, Bewegungsprofile, Gesundheitsdaten, biometrische Daten, KI-Modelldaten...]</text:p>
      <text:p text:style-name="Default">Betroffene: [Mitarbeiter, Kunden, Patienten, Minderjaehrige, vulnerable Personen]</text:p>
      <text:p text:style-name="Default">Empfaenger: [Innerhalb EWR, Drittland, Auftragsverarbeiter]</text:p>
      <text:p text:style-name="Default">Speicherdauer: [konkret + Loeschkonzept]</text:p>
      <text:p text:style-name="Default">Internationale Uebermittlung: [SCC, Angemessenheitsbeschluss, BCR]</text:p>
      <text:h text:style-name="H2" text:outline-level="2">2. Erforderlichkeit und Verhaeltnismaessigkeit</text:h>
      <text:p text:style-name="Default">- Ist die Verarbeitung fuer den Zweck erforderlich?</text:p>
      <text:p text:style-name="Default">- Gibt es mildere Mittel (Pseudonymisierung, Aggregation, Minimierung)?</text:p>
      <text:p text:style-name="Default">- Sind die Daten dem Zweck angemessen, erheblich und auf das notwendige Mass beschraenkt? (Art. 5 I c)</text:p>
      <text:h text:style-name="H2" text:outline-level="2">3. Risikoanalyse</text:h>
      <text:p text:style-name="Default">Risiken fuer Betroffene (Beispiele):</text:p>
      <text:p text:style-name="Default">- Diskriminierung, Identitaetsdiebstahl, Rufschaedigung</text:p>
      <text:p text:style-name="Default">- Verlust der Kontrolle ueber personenbezogene Daten</text:p>
      <text:p text:style-name="Default">- Profilbildung, automatisierte Entscheidung (Art. 22)</text:p>
      <text:p text:style-name="Default">- Schwer messbare Folgen (insbes. besondere Datenkategorien)</text:p>
      <text:p text:style-name="Default">Skala: Eintrittswahrscheinlichkeit [niedrig/mittel/hoch] x Schadensschwere [niedrig/mittel/hoch] = Risikoampel.</text:p>
      <text:h text:style-name="H2" text:outline-level="2">4. Geplante Massnahmen (Art. 32 DSGVO)</text:h>
      <text:p text:style-name="Default">Technisch: [Verschluesselung, Pseudonymisierung, Zugriffskontrolle, Logging, Loeschroutinen]</text:p>
      <text:p text:style-name="Default">Organisatorisch: [Schulung, AVV-Pflicht-Check, Rollenkonzept, Notfallplan]</text:p>
      <text:p text:style-name="Default">Verfahrensgarantien: [Betroffenenrechte: Auskunft, Berichtigung, Loeschung, Widerspruch — Implementierung]</text:p>
      <text:h text:style-name="H2" text:outline-level="2">5. Konsultation</text:h>
      <text:p text:style-name="Default">- Datenschutzbeauftragter eingebunden ($ 38 BDSG / Art. 35 II DSGVO)</text:p>
      <text:p text:style-name="Default">- Betroffene oder Vertreter angehoert (Art. 35 IX)</text:p>
      <text:p text:style-name="Default">- Bei verbleibendem hohen Restrisiko trotz Massnahmen: Konsultation Aufsichtsbehoerde (Art. 36)</text:p>
      <text:h text:style-name="H2" text:outline-level="2">6. Restrisiko-Bewertung und Ergebnis</text:h>
      <text:p text:style-name="Default">Restrisiko nach Massnahmen: [niedrig/mittel/hoch]</text:p>
      <text:p text:style-name="Default">Entscheidung: [Verarbeitung zulaessig / Konsultation Aufsichtsbehoerde / Verarbeitung nicht moeglich]</text:p>
      <text:p text:style-name="Default">Folgepflicht: regelmaessige Ueberpruefung; Reevaluation bei Aenderungen.</text:p>
      <text:p text:style-name="Default"/>
      <text:h text:style-name="H3" text:outline-level="3">Felder im Template</text:h>
      <text:p text:style-name="Default">• [Verantwortlicher + DSB]</text:p>
      <text:p text:style-name="Default">• [Verarbeitungstaetigkeit]</text:p>
      <text:p text:style-name="Default">• [Rechtsgrundlage]</text:p>
      <text:p text:style-name="Default">• [Datenkategorien]</text:p>
      <text:p text:style-name="Default">• [Empfaenger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