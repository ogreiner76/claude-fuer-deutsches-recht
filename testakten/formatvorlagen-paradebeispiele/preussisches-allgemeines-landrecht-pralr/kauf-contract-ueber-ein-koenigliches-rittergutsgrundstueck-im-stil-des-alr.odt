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Kauf-Contract ueber ein Grundstuecks-Pertinenz nach den Vorschriften des Allgemeinen Landrechts fuer die Preussischen Staaten (PrALR 1794)</text:h>
      <text:p text:style-name="Default">*Anmerkung: Diese experimentelle, bewusst anachronistisch-stilistische KI-Vorlage bildet einen Grundstuecks-Kauf-Contract im Rechts- und Sprachstil des Allgemeinen Landrechts fuer die Preussischen Staaten von 1794 (PrALR; I. Theil, 11. Titel, $$ 1 ff.) nach. Sie ist ein Lehr- und Unterhaltungsformat. Keine historische Authentizitaet, keine Haftung; gegenwaertiges deutsches Recht ist anwendbar und richtet sich nach BGB $$ 311b, 925; GBO; Notarrecht; KSTG. Cicero hat im Berliner Provinzialarchiv keine Akten hinterlassen.*</text:p>
      <text:p text:style-name="Default"/>
      <text:p text:style-name="CenterBold">KAUF-CONTRACT</text:p>
      <text:p text:style-name="Center">in fundo regio [Name des Gutes]</text:p>
      <text:p text:style-name="Center">Berlin, den [Datum] des Jahres Eintausend Siebenhundert und [Jahresziffer]</text:p>
      <text:p text:style-name="Default"/>
      <text:h text:style-name="H2" text:outline-level="2">Vorbemerckung</text:h>
      <text:p text:style-name="Default">Es ist heute, an dem zur Ueberschrifft genannten Tage, zwischen denen unterschriebenen Contrahenten, naemlich:</text:p>
      <text:p text:style-name="Default">**Dem Herrn Veraeusserer**, dem Wohlgeborenen, Hoch- und Wohlachtbaren [Vorname und Nachname], Koeniglich Preussischem [Titel/Beruf], wohnhaftig zu [Ort], als Eigenthuemer und alleinigem Besitzer der nachher genannten Grundstuecks-Pertinenz, sowie</text:p>
      <text:p text:style-name="Default">**Dem Herrn Erwerber**, dem Hochwohlgeborenen, Hoch- und Wohlachtbaren [Vorname und Nachname], [Stand/Beruf], wohnhaftig zu [Ort], als kuenfftigem Eigenthuemer,</text:p>
      <text:p text:style-name="Default">vor zwei zuverlaessigen, der Schreib- und Lesekunst maechtigen Zeugen und in Gegenwart unsres Koeniglichen Justiz-Commissarii, des Herrn [Name], nachstehender Kauf-Contract verabredet und beschlossen worden, wie folgt:</text:p>
      <text:h text:style-name="H2" text:outline-level="2">$ 1. Vom Kauf-Gegenstande</text:h>
      <text:p text:style-name="Default">Der Herr Veraeusserer verkauffet und uebertraget hiermit dem Herrn Erwerber, welcher beydes zugleich annimmt, das ihm gehoerige zu [Belegenheit, Kreis, Provinz] gelegene Grundstueck, naemlich:</text:p>
      <text:p text:style-name="Default">(a) der **Acker und das Wieserland** im Maasse von [Anzahl] Morgen [Berlinischen / Magdeburgischen] und [Anzahl] Quadrat-Ruthen,</text:p>
      <text:p text:style-name="Default">(b) das daselbst aufgefuehrte **Wohnhaus**, beste­hend in einem Hauptgebaeude von zwo Geschoss-Etagen, Stallung, Scheune und sonstigen pertinenzialischen Gebaeuden,</text:p>
      <text:p text:style-name="Default">(c) **saemmtliche Realfolgen und Gerechtsamen**, so an diesem Grundstuecke kraft des Allgemeinen Landrechts (I. Theil, 9. Titel, $$ 1 ff.) hangen, einschlieslich der Wasser-, Holz- und Triftrechte, soweit selbige nicht durch besondere Servituten zu Gunsten Dritter beschwehrt sind.</text:p>
      <text:p text:style-name="Default">Das alles hiernach so wie es liegt und steht, mit allem darauf befindlichen Mobiliar nach der angehangenen Specification (Anlage A).</text:p>
      <text:h text:style-name="H2" text:outline-level="2">$ 2. Vom Kauf-Pretium und der Berichtigung desselben</text:h>
      <text:p text:style-name="Default">(1) Der Kauf-Pretium ist auf **[Betrag] Thaler Couranter Berliner Muenze**, in Worten "Eintausend [...] Thaler" festgesetzet.</text:p>
      <text:p text:style-name="Default">(2) Hievon werden:</text:p>
      <text:p text:style-name="Default">(a) [Anzahl] Thaler durch Annahme der auf dem Grundstuecke ruhenden, zur hypothecarischen Sicherheit eingetragenen Schulden (siehe Hypotheken-Buch des Konigl. Stadt­gerichts zu [Ort], fol. [Folio]) abgegolten,</text:p>
      <text:p text:style-name="Default">(b) [Anzahl] Thaler binnen [Frist] Tagen nach Schluss dieses Contracts in Praesentia von zwo Zeugen contant in die Haende des Veraeusserers ausgezahlet, oder durch Trat­ten auf das Konigl. Banco-Officium honoriret.</text:p>
      <text:p text:style-name="Default">(3) Die Verzinsung des noch nicht bezahlten Kauf-Pretii erfolget zu **fuenff Procent vom Hundert jaehrlich**, nach dem Zinsfusse, so nach PrALR I. Theil, 11. Titel, $ 250 das gewoehnliche Mass ist.</text:p>
      <text:h text:style-name="H2" text:outline-level="2">$ 3. Von der Auflassung</text:h>
      <text:p text:style-name="Default">Die Auflassung der Sache (cessio rei) erfolget vor dem zustaendigen **Konigl. Stadt- und Landgerichts-Inspector zu [Ort]** an einem von beiden Theilen alsobald nach Berichtigung des Kauf-Pretii anzu­be­ramenden Termine. Vor diesem Termine bleibt das Eigenthum bei dem Veraeusserer; nach demselben tritt das volle Eigenthumsrecht — sammt allen Frueh- und Spaetfruechten — an den Erwerber ueber, gemaess I. Theil, 9. Titel, $$ 1 ff. PrALR.</text:p>
      <text:h text:style-name="H2" text:outline-level="2">$ 4. Von der Gewaehrleistung (Eviction und Vitia)</text:h>
      <text:p text:style-name="Default">(1) Der Veraeusserer leistet **doppelten Schadenersatz** im Falle einer Eviction, soferne der Erwerber durch Urteil eines Konigl. Gerichts in der Sache abtraet (cf. I. Theil, 11. Titel, $$ 135 ff.).</text:p>
      <text:p text:style-name="Default">(2) Hinsichtlich der heimlichen Maengel (vitia occulta) wird stipulieret, dass der Veraeusserer derselben nicht wissentlich verschwiegen habe; bezueglich offener Maengel (vitia conspicua) ist der Erwerber durch Besichtigung gehalten und kann nicht­hin­wider klagen.</text:p>
      <text:h text:style-name="H2" text:outline-level="2">$ 5. Vom Brand- und Hagel-Schaden</text:h>
      <text:p text:style-name="Default">Die Gefahr (periculum) gehet auf den Erwerber ueber mit Vollziehung der Auflassung. Bis dahin haftet der Veraeusserer fuer alle Schadensfaelle, ausgenommen vis maior (Krieg, Feuersbrunst durch fremdes Verschulden).</text:p>
      <text:h text:style-name="H2" text:outline-level="2">$ 6. Von den Stempeln, Sportien und Steuern</text:h>
      <text:p text:style-name="Default">(1) Die Stempel- und Sportel-Gebuehren des Kauf-Contracts traegt der **Erwerber**.</text:p>
      <text:p text:style-name="Default">(2) Die rueckstaendigen Grund-, Gebaeude- und Klassen-Steuern bis zum Tag der Auflassung gehen zu Lasten des Veraeusserers; die hernach faelligen zu Lasten des Erwerbers.</text:p>
      <text:h text:style-name="H2" text:outline-level="2">$ 7. Streitschlichtung und Gerichtsstand</text:h>
      <text:p text:style-name="Default">(1) Im Streitfalle erkennt das **Konigl. Justiz-Collegium [Provinz]**, in Subsidio das Konigl. Kammergericht zu Berlin.</text:p>
      <text:p text:style-name="Default">(2) Vor Anrufung des Gerichts soll versucht werden, durch ein Bonum officium des Justiz-Commissarii eine guetliche Beylegung herbeyzufuehren.</text:p>
      <text:h text:style-name="H2" text:outline-level="2">$ 8. Schluss-Vorbemerckung</text:h>
      <text:p text:style-name="Default">Beide Theile bekennen ihren consensus im Sinne des I. Theil, 4. Titel, $$ 79 ff. PrALR, und versichern, dass keine geheime Beweggruende, kein dolus, kein Irrthumb sich hier eingeschlichen habe, so dieses Geschaeft entkraefften koennte.</text:p>
      <text:p text:style-name="Default">Zum Beweise dessen haben beide Contrahenten dieses Instrument eigenhaendig unterschrieben und mit ihrem Petschaft besiegelt.</text:p>
      <text:p text:style-name="Default"/>
      <text:p text:style-name="Default">[Ort], am [Datum] anno [Jahr].</text:p>
      <text:p text:style-name="Default"/>
      <text:p text:style-name="Default">Der Veraeusserer:  ____________________   [L.S.]</text:p>
      <text:p text:style-name="Default">Der Erwerber:      ____________________   [L.S.]</text:p>
      <text:p text:style-name="Default"/>
      <text:p text:style-name="Default">Zeuge I:           ____________________</text:p>
      <text:p text:style-name="Default">Zeuge II:          ____________________</text:p>
      <text:p text:style-name="Default"/>
      <text:p text:style-name="Default">Vor mir, dem Konigl. Justiz-Commissario:</text:p>
      <text:p text:style-name="Default"/>
      <text:p text:style-name="Default">[Name], Justizrath</text:p>
      <text:h text:style-name="H2" text:outline-level="2">Hinweis fuer den modernen Anwender</text:h>
      <text:p text:style-name="Default">Heute geltendes Recht (Stand 2026): $$ 311b, 873, 925 BGB; $ 873 BGB (Einigung und Eintragung); $ 925 BGB (Auflassung vor Notar); GBO (Grundbuchordnung). Notarpflicht statt Justiz-Commissarius. Diese Vorlage ist eine sprachliche Hommage; fuer reale Geschaefte ist heute eine notarielle Beurkundung und Eintragung im Grundbuch erforderlich.</text:p>
      <text:p text:style-name="Default"/>
      <text:h text:style-name="H3" text:outline-level="3">Felder im Template</text:h>
      <text:p text:style-name="Default">• [Name Veraeusserer + Titel + Wohnort]</text:p>
      <text:p text:style-name="Default">• [Name Erwerber + Stand + Wohnort]</text:p>
      <text:p text:style-name="Default">• [Belegenheit + Kreis + Provinz]</text:p>
      <text:p text:style-name="Default">• [Anzahl Morgen + Ruthen]</text:p>
      <text:p text:style-name="Default">• [Kauf-Pretium in Thalern]</text:p>
      <text:p text:style-name="Default">• [Hypotheken-Buch-Folio]</text:p>
      <text:p text:style-name="Default">• [Datum]</text:p>
      <text:p text:style-name="Default">• [Justiz-Commissar-Name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