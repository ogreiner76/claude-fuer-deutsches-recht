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isclaimer">Caution: This is an experimental AI-generated template. No liability, no warranty. For exploration of the skills and an AI only; not legal advice. Must be reviewed by a lawyer before any use in a mandate.</text:p>
      <text:p text:style-name="Default"/>
      <text:h text:style-name="H1" text:outline-level="1">EMPTIO ET VENDITIO — De amphoris vini Graeci e Piraeo per Neapolim Ostiamque transportandis</text:h>
      <text:p text:style-name="Default">*Anmerkung: Dies ist eine experimentelle, anachronistisch-spielerische KI-Vorlage im Stil eines klassisch-roemischen Kaufvertrags. Sie kombiniert die emptio venditio des klassischen ius civile (Gaius Inst. 3.139 ff.; D. 18,1 ff.) mit modernen Klauseln (Transport, periculum, dolus) zur Anschauung. Keine historische Authentizitaet, keine Haftung. Cicero hat keinen Kaufvertrag dieser Art mit Klauseln so verfasst — der Stil ist eine Hommage.*</text:p>
      <text:p text:style-name="Default">*Note: This is an experimental, intentionally anachronistic AI template in the style of a Classical Roman sale contract. Combines the emptio venditio of the ius civile with modern clauses (transport, risk allocation, dolus) for illustration. Not historically authentic.*</text:p>
      <text:p text:style-name="Default"/>
      <text:p text:style-name="CenterBold">INSTRUMENTUM EMPTIONIS ET VENDITIONIS</text:p>
      <text:p text:style-name="Center">A. D. [Kalenderdatum nach roem. Kalender]</text:p>
      <text:p text:style-name="Center">[Konsul-Jahr, z. B. M. Tullio Cicerone consule]</text:p>
      <text:p text:style-name="Default"/>
      <text:h text:style-name="H2" text:outline-level="2">Inter contrahentes</text:h>
      <text:p text:style-name="Default">(1) **Venditor**: [Nomen venditoris], civis Romanus, e tribu [Tribus], domicilium habens [Ad domicilium Romae sito].</text:p>
      <text:p text:style-name="Default">(2) **Emptor**: [Nomen emptoris], civis Romanus, [Beruf, z. B. mercator vinarius], e tribu [Tribus], domicilium [Ad locum].</text:p>
      <text:h text:style-name="H2" text:outline-level="2">Caput I — De re vendita</text:h>
      <text:p text:style-name="Default">Venditor emptori, idque emptor a venditore emit, **amphoras [Numero, z. B. ducentas] vini Graeci** generis [Sorte, z. B. Chii], cuiusque amphorae mensura sit unum metretam Atticam (= circa XXXIX libras), totalibus libris [Gesamtmenge] vini. Vinum est ex vinea provinciae [Achaia / Macedonia] anno superiore lectum et in dolio Pii [Datum] conditum.</text:p>
      <text:p text:style-name="Default">*[Wenn Probe noetig: Klausel "vino degustando" einfuegen.]*</text:p>
      <text:h text:style-name="H2" text:outline-level="2">Caput II — De pretio</text:h>
      <text:p text:style-name="Default">Pretium constitutum est **[Anzahl] sestertiis** (HS [Zahl]) per amphoram, totaliter **HS [Gesamtpretium]**. Pretium emptor venditori solvere debet partim in nummo (drittel Hs ad signum), partim per litteras chirographales penes argentarium [Name des Bankiers] sub die [Termin].</text:p>
      <text:h text:style-name="H2" text:outline-level="2">Caput III — De traditione et periculo</text:h>
      <text:p text:style-name="Default">(1) Traditio rei venditae fiet in portu **Piraeo**, ubi venditor ad navem oneraneam [Schiffsname, z. B. "Fortuna"] amphoras tradet.</text:p>
      <text:p text:style-name="Default">(2) **Periculum**: Cum amphorae in navim collocatae sunt et navis solvit, periculum, secundum receptam Sabinianorum sententiam (D. 18,6,1pr.), in emptorem transit, nisi aliter pactum sit. *Hic aliter pactum est:* venditor periculum suscipit usque ad portum **Ostiense**, sed emptor periculum suscipit a portu Neapolitano (Puteoli) ad ulteriorem itineris partem (per via Appia ad horrea emptoris).</text:p>
      <text:h text:style-name="H2" text:outline-level="2">Caput IV — De itinere</text:h>
      <text:p text:style-name="Default">Iter: **Piraeo → Neapolim (Puteoli) → Ostiam** (mare Tyrrhenum); deinde **Ostia → horrea emptoris** via Ostiensi. Termini:</text:p>
      <text:p text:style-name="Default">- Solutio navis: ante diem [Datum]</text:p>
      <text:p text:style-name="Default">- Adventus ad Neapolim: ante kalendas [Monat]</text:p>
      <text:p text:style-name="Default">- Translatio ad Ostiam: intra [Anzahl] dies</text:p>
      <text:p text:style-name="Default">- Receptio in horreis: ante idus [Monat]</text:p>
      <text:h text:style-name="H2" text:outline-level="2">Caput V — De fideiussione vehiculi</text:h>
      <text:p text:style-name="Default">Venditor fideiussionem maritimam (assecuratio maritima) habet apud foenerator [Name] pretio HS [Pretium] pro casu naufragii vel piraticae. *Hinweis: Eine eigentliche "Versicherung" im modernen Sinne kennt das klassische roem. Recht nicht; existierte aber das foenus nauticum (Seedarlehen) mit Risikouebernahme durch den Glaeubiger — D. 22,2,1 ff. Anachronistische Mischung.*</text:p>
      <text:h text:style-name="H2" text:outline-level="2">Caput VI — De edilicia stipulatione (Sachmaengelhaftung)</text:h>
      <text:p text:style-name="Default">(1) Venditor solemniter stipulatur, vinum esse [Eigenschaften: "non corruptum, non acidum, optimi saporis"], et amphoras esse integras et signatas signo officinae.</text:p>
      <text:p text:style-name="Default">(2) Si vinum vitium habuerit (acetum factum sit, vel quia corruptum vel quia non Chium sed inferius est), emptori actio redhibitoria sex menses, actio quanti minoris annum habet (D. 21,1).</text:p>
      <text:h text:style-name="H2" text:outline-level="2">Caput VII — De dolo</text:h>
      <text:p text:style-name="Default">Si quid dolo malo venditoris emptori datum sit, actio doli (D. 4,3) emptori competit, neque haec stipulatio illi obstabit.</text:p>
      <text:h text:style-name="H2" text:outline-level="2">Caput VIII — De forum</text:h>
      <text:p text:style-name="Default">Litibus quibusvis ex hac emptione et venditione obortis cognoscat **praetor urbanus Romae**, vel arbitri ex compromisso (D. 4,8) electi.</text:p>
      <text:h text:style-name="H2" text:outline-level="2">Subscriptio</text:h>
      <text:p text:style-name="Default">Acta sunt haec [Ort, z. B. Romae, in foro] coram testibus septem civibus Romanis idoneis [Namen]:</text:p>
      <text:p text:style-name="Default">1. [Nomen testis I]</text:p>
      <text:p text:style-name="Default">2. [Nomen testis II]</text:p>
      <text:p text:style-name="Default">3. [Nomen testis III]</text:p>
      <text:p text:style-name="Default">4. [Nomen testis IV]</text:p>
      <text:p text:style-name="Default">5. [Nomen testis V]</text:p>
      <text:p text:style-name="Default">6. [Nomen testis VI]</text:p>
      <text:p text:style-name="Default">7. [Nomen testis VII]</text:p>
      <text:p text:style-name="Default">Signum venditoris [signo]   Signum emptoris [signo]</text:p>
      <text:p text:style-name="Default"/>
      <text:h text:style-name="H2" text:outline-level="2">Hinweis fuer den modernen Anwender</text:h>
      <text:p text:style-name="Default">Das klassische ius civile kannte: Konsensvertrag emptio venditio (Gaius Inst. 3.139, D. 18); Eviktionshaftung; aedilizische Edikte fuer Sklaven- und Tierhandel (mit actio redhibitoria, quanti minoris); periculum-Doktrin (Risiko ab perfecter Kaufeinigung mit dem Emptor, D. 18,6,1pr. — schon im klassischen Recht streitig). Eine ausdrueckliche Schriftform war nicht erforderlich (consensus reicht), aber Beweisurkunden ueblich. Versicherung im modernen Sinn existierte nicht — Risikoumverteilung erfolgte ueber **foenus nauticum** (Seedarlehen, D. 22,2). Die Vorlage mischt klassische Bausteine mit modernen Vertragsklauseln — fuer Lehrzwecke gedacht.</text:p>
      <text:p text:style-name="Default"/>
      <text:h text:style-name="H3" text:outline-level="3">Felder im Template</text:h>
      <text:p text:style-name="Default">• [Nomen venditoris + Tribus]</text:p>
      <text:p text:style-name="Default">• [Nomen emptoris + Beruf]</text:p>
      <text:p text:style-name="Default">• [Anzahl amphorae]</text:p>
      <text:p text:style-name="Default">• [Vino-Sorte]</text:p>
      <text:p text:style-name="Default">• [Gesamtpretium HS]</text:p>
      <text:p text:style-name="Default">• [Schiffsname]</text:p>
      <text:p text:style-name="Default">• [Bankier-Name]</text:p>
      <text:p text:style-name="Default">• [Konkrete Datumsangaben nach roem. Kalender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