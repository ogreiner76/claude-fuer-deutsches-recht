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Grundstueckskaufvertrag mit Auflassung ($ 925 BGB)</text:h>
      <text:p text:style-name="Default"/>
      <text:p text:style-name="CenterBold">NOTARIELLE URKUNDE</text:p>
      <text:p text:style-name="Center">Grundstueckskaufvertrag mit Auflassung</text:p>
      <text:p text:style-name="Center">UR-Nr. [Nr.] / [Jahr]</text:p>
      <text:p text:style-name="Default">Heute, am [Datum], erschienen vor mir, dem unterzeichneten Notar [Name] mit Amtssitz in [Ort],</text:p>
      <text:p text:style-name="Default">1. Herr/Frau [Verkaeufer Vorname Nachname], geboren am [Datum], wohnhaft [Anschrift] — nachfolgend "Verkaeufer" —</text:p>
      <text:p text:style-name="Default">2. Herr/Frau [Kaeufer Vorname Nachname], geboren am [Datum], wohnhaft [Anschrift] — nachfolgend "Kaeufer" —</text:p>
      <text:p text:style-name="Default">Die Erschienenen sind ueber ihre Identitaet, die rechtlichen Folgen sowie die Belehrung nach $ 17 BeurkG aufgeklaert.</text:p>
      <text:h text:style-name="H2" text:outline-level="2">$ 1 Vertragsgegenstand</text:h>
      <text:p text:style-name="Default">Vertragsgegenstand ist das im Grundbuch von [Grundbuchamt], Bd. [Bd.], Bl. [Bl.], eingetragene Grundstueck:</text:p>
      <text:p text:style-name="Default">Flur [Nr.], Flurstueck [Nr.], Wirtschaftsart [Bebauung], Groesse [m2], Lage [Adresse].</text:p>
      <text:h text:style-name="H2" text:outline-level="2">$ 2 Kaufpreis und Zahlungsmodalitaeten</text:h>
      <text:p text:style-name="Default">(1) Der Kaufpreis betraegt [Betrag] EUR (in Worten: [...]). Er wird faellig nach Vorliegen folgender Voraussetzungen ($ 873 II BGB):</text:p>
      <text:p text:style-name="Default">- Eintragung Auflassungsvormerkung zugunsten Kaeufer ($ 883 BGB)</text:p>
      <text:p text:style-name="Default">- Loeschungsbewilligung bestehender Belastungen oder Nachweis Uebernahme</text:p>
      <text:p text:style-name="Default">- Vorkaufsrechts-Verzichtserklaerung Gemeinde ($ 28 BauGB)</text:p>
      <text:p text:style-name="Default">- Negativattest oder GrESt-Bescheid</text:p>
      <text:p text:style-name="Default">(2) Zahlung auf Notar-Anderkonto / direkt: [Variante]. Verzugszinsen 9 % ueber Basiszins ($ 288 II BGB).</text:p>
      <text:h text:style-name="H2" text:outline-level="2">$ 3 Lastenfreiheit und Uebernahme</text:h>
      <text:p text:style-name="Default">(1) Der Verkaeufer steht dafuer ein, dass das Vertragsobjekt im Zeitpunkt der Umschreibung frei von im Grundbuch nicht ersichtlichen Belastungen ist.</text:p>
      <text:p text:style-name="Default">(2) Im Grundbuch eingetragene Belastungen [Abt. II / III] werden [zur Loeschung gebracht / vom Kaeufer uebernommen mit Anrechnung auf den Kaufpreis].</text:p>
      <text:h text:style-name="H2" text:outline-level="2">$ 4 Gewaehrleistung</text:h>
      <text:p text:style-name="Default">(1) Die Vertragsparteien sind sich einig, dass die Gewaehrleistung fuer Sachmaengel ausgeschlossen wird ($ 444 BGB Vorsatz/Garantie ausgenommen).</text:p>
      <text:p text:style-name="Default">(2) Der Verkaeufer versichert, ihm seien keine versteckten Maengel — insbesondere Altlasten, Bodenkontaminationen, Hausschwamm — bekannt.</text:p>
      <text:p text:style-name="Default">(3) Bei vorsaetzlichem Verschweigen wesentlicher Maengel ($ 444 BGB) bleibt die Haftung unberuehrt.</text:p>
      <text:h text:style-name="H2" text:outline-level="2">$ 5 Nutzen-, Lasten- und Gefahrenuebergang</text:h>
      <text:p text:style-name="Default">Mit vollstaendiger Kaufpreiszahlung gehen Besitz, Nutzungen, Lasten und Gefahr ($ 446 BGB) auf den Kaeufer ueber. Der Verkaeufer raeumt das Grundstueck bis zum [Datum] vollstaendig.</text:p>
      <text:h text:style-name="H2" text:outline-level="2">$ 6 Auflassung</text:h>
      <text:p text:style-name="Default">Die Vertragsparteien sind sich einig, dass das Eigentum an dem Vertragsobjekt vom Verkaeufer auf den Kaeufer uebergeht. Sie bewilligen und beantragen die Eintragung dieser Eigentumsaenderung im Grundbuch ($ 925 BGB).</text:p>
      <text:h text:style-name="H2" text:outline-level="2">$ 7 Vollmacht, Vollzugsklausel, Kostenverteilung</text:h>
      <text:p text:style-name="Default">(1) Der Notar wird beauftragt und bevollmaechtigt, saemtliche Vollzugshandlungen vorzunehmen.</text:p>
      <text:p text:style-name="Default">(2) Kosten: Notarkosten, Grundbuchgebuehren, Grunderwerbsteuer traegt der Kaeufer (Standard). Loeschungsgebuehren bestehender Belastungen traegt der Verkaeufer.</text:p>
      <text:p text:style-name="Default">(3) Die Beurkundungsurkunde wurde den Erschienenen vorgelesen, von ihnen genehmigt und eigenhaendig unterzeichnet.</text:p>
      <text:p text:style-name="Default"/>
      <text:p text:style-name="Default">[Ort], [Datum]</text:p>
      <text:p text:style-name="Default">_______________   _______________   _______________</text:p>
      <text:p text:style-name="Default">Verkaeufer            Kaeufer               Notar</text:p>
      <text:p text:style-name="Default"/>
      <text:h text:style-name="H3" text:outline-level="3">Felder im Template</text:h>
      <text:p text:style-name="Default">• [Notar Name]</text:p>
      <text:p text:style-name="Default">• [Notar Sitz]</text:p>
      <text:p text:style-name="Default">• [Verkaeufer/Kaeufer Daten]</text:p>
      <text:p text:style-name="Default">• [Grundbuchdaten]</text:p>
      <text:p text:style-name="Default">• [Kaufpreis]</text:p>
      <text:p text:style-name="Default">• [Belastungs-Variante]</text:p>
      <text:p text:style-name="Default">• [Raeumungs-Datum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